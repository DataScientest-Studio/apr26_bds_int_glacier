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3.844cm" fo:break-before="auto" style:use-optimal-row-height="true"/>
    </style:style>
    <style:style style:name="ro3" style:family="table-row">
      <style:table-row-properties style:row-height="5.26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column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shrink-to-fit="false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  <style:text-properties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lumn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6" table:default-cell-style-name="ce2"/>
        <table:table-column table:style-name="co7" table:number-columns-repeated="1009" table:default-cell-style-name="Excel_20_Built-in_20_Normal"/>
        <table:table-row table:style-name="ro1">
          <table:table-cell table:style-name="ce1" office:value-type="string">
            <text:p>number of column</text:p>
          </table:table-cell>
          <table:table-cell table:style-name="ce1" office:value-type="string">
            <text:p>name of column</text:p>
          </table:table-cell>
          <table:table-cell table:style-name="ce1" office:value-type="string">
            <text:p>name of variable</text:p>
          </table:table-cell>
          <table:table-cell table:style-name="ce1" office:value-type="string">
            <text:p>name of measurement station</text:p>
          </table:table-cell>
          <table:table-cell table:style-name="ce1" office:value-type="string">
            <text:p>measurement instrument</text:p>
          </table:table-cell>
          <table:table-cell table:style-name="ce1" office:value-type="string">
            <text:p>measurement unit of variable</text:p>
          </table:table-cell>
          <table:table-cell table:style-name="ce1" office:value-type="string">
            <text:p>categorical/quantitative</text:p>
          </table:table-cell>
          <table:table-cell table:style-name="ce1" office:value-type="string">
            <text:p>type of variable</text:p>
          </table:table-cell>
          <table:table-cell table:style-name="ce1" office:value-type="string">
            <text:p>percentage of missing values</text:p>
          </table:table-cell>
          <table:table-cell table:style-name="ce1" office:value-type="string">
            <text:p>Stat. values before pre-process</text:p>
          </table:table-cell>
          <table:table-cell table:style-name="ce1" office:value-type="string">
            <text:p>distribu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ercentage of missing values</text:p>
          </table:table-cell>
          <table:table-cell table:style-name="ce1" office:value-type="string">
            <text:p>Stat. values after pre process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M_temperature</text:p>
          </table:table-cell>
          <table:table-cell office:value-type="string">
            <text:p>Air temperature at 2 m height</text:p>
          </table:table-cell>
          <table:table-cell office:value-type="string">
            <text:p>Pegelstation Meteorologie, height 2640 m</text:p>
          </table:table-cell>
          <table:table-cell office:value-type="string">
            <text:p>Pt-100 temperature sensor with ventilation fan</text:p>
          </table:table-cell>
          <table:table-cell office:value-type="string">
            <text:p>°C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105206368471046">
            <text:p>0,0010520637</text:p>
          </table:table-cell>
          <table:table-cell office:value-type="string">
            <text:p>count: 1260953.00</text:p>
            <text:p>mean: -0.14</text:p>
            <text:p>std: 7.42</text:p>
            <text:p>min: -29.71</text:p>
            <text:p>25%: -5.20</text:p>
            <text:p>50%: -0.07</text:p>
            <text:p>75%: 5.36</text:p>
            <text:p>max: 21.03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-0.14</text:p>
            <text:p>std: 7.42</text:p>
            <text:p>min: -29.71</text:p>
            <text:p>25%: -5.21</text:p>
            <text:p>50%: -0.07</text:p>
            <text:p>75%: 5.36</text:p>
            <text:p>max: 21.03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M_atmospheric_pressure</text:p>
          </table:table-cell>
          <table:table-cell office:value-type="string">
            <text:p>Pressure, atmospheric</text:p>
          </table:table-cell>
          <table:table-cell office:value-type="string">
            <text:p>Pegelstation Meteorologie, height 2640 m</text:p>
          </table:table-cell>
          <table:table-cell office:value-type="string">
            <text:p>Barometric pressure sensor, Druck, RPT 410h</text:p>
          </table:table-cell>
          <table:table-cell office:value-type="string">
            <text:p>hPa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726462649758651">
            <text:p>0,0007264626</text:p>
          </table:table-cell>
          <table:table-cell office:value-type="string">
            <text:p>count: 1261364.00</text:p>
            <text:p>mean: 38.18</text:p>
            <text:p>std: 7.97</text:p>
            <text:p>min: 0.41</text:p>
            <text:p>25%: 33.34</text:p>
            <text:p>50%: 39.62</text:p>
            <text:p>75%: 44.21</text:p>
            <text:p>max: 56.43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738.18</text:p>
            <text:p>std: 7.97</text:p>
            <text:p>min: 700.41</text:p>
            <text:p>25%: 733.35</text:p>
            <text:p>50%: 739.62</text:p>
            <text:p>75%: 744.21</text:p>
            <text:p>max: 756.43</text:p>
          </table:table-cell>
          <table:table-cell table:number-columns-repeated="100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M_relative_humidity</text:p>
          </table:table-cell>
          <table:table-cell office:value-type="string">
            <text:p>Humidity, relative</text:p>
          </table:table-cell>
          <table:table-cell office:value-type="string">
            <text:p>Pegelstation Meteorologie, height 2640 m</text:p>
          </table:table-cell>
          <table:table-cell office:value-type="string">
            <text:p>Hair hygrometer, Thies Clima</text:p>
          </table:table-cell>
          <table:table-cell office:value-type="string">
            <text:p>%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2851979868191">
            <text:p>0,000285198</text:p>
          </table:table-cell>
          <table:table-cell office:value-type="string">
            <text:p>count: 1261921.00</text:p>
            <text:p>mean: 71.30</text:p>
            <text:p>std: 18.09</text:p>
            <text:p>min: 17.54</text:p>
            <text:p>25%: 58.02</text:p>
            <text:p>50%: 74.17</text:p>
            <text:p>75%: 85.20</text:p>
            <text:p>max: 99.9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71.30</text:p>
            <text:p>std: 18.09</text:p>
            <text:p>min: 17.54</text:p>
            <text:p>25%: 58.02</text:p>
            <text:p>50%: 74.18</text:p>
            <text:p>75%: 85.20</text:p>
            <text:p>max: 99.90</text:p>
          </table:table-cell>
          <table:table-cell table:number-columns-repeated="100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M_precipitation</text:p>
          </table:table-cell>
          <table:table-cell office:value-type="string">
            <text:p>Precipitation</text:p>
          </table:table-cell>
          <table:table-cell office:value-type="string">
            <text:p>Pegelstation Meteorologie, height 2640 m</text:p>
          </table:table-cell>
          <table:table-cell office:value-type="string">
            <text:p>Tipping bucket, Gertsch, unheated</text:p>
          </table:table-cell>
          <table:table-cell office:value-type="string">
            <text:p>mm/5 min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162651580749453">
            <text:p>0,1626515807</text:p>
          </table:table-cell>
          <table:table-cell office:value-type="string">
            <text:p>count: 1056969.00</text:p>
            <text:p>mean: 0.01</text:p>
            <text:p>std: 0.06</text:p>
            <text:p>min: 0.00</text:p>
            <text:p>25%: 0.00</text:p>
            <text:p>50%: 0.00</text:p>
            <text:p>75%: 0.00</text:p>
            <text:p>max: 6.30</text:p>
          </table:table-cell>
          <table:table-cell/>
          <table:table-cell office:value-type="string">
            <text:p>data with a lot of gaps (du to measurement handling)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0.01</text:p>
            <text:p>std: 0.05</text:p>
            <text:p>min: 0.00</text:p>
            <text:p>25%: 0.00</text:p>
            <text:p>50%: 0.00</text:p>
            <text:p>75%: 0.00</text:p>
            <text:p>max: 6.30</text:p>
          </table:table-cell>
          <table:table-cell table:number-columns-repeated="100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M_precipitation_cum</text:p>
          </table:table-cell>
          <table:table-cell office:value-type="string">
            <text:p>Precipitation, sum</text:p>
          </table:table-cell>
          <table:table-cell office:value-type="string">
            <text:p>Pegelstation Meteorologie, height 2640 m</text:p>
          </table:table-cell>
          <table:table-cell office:value-type="string">
            <text:p>Weighing rain gauge, Belfort</text:p>
          </table:table-cell>
          <table:table-cell office:value-type="string">
            <text:p>m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337420907072197">
            <text:p>0,0337420907</text:p>
          </table:table-cell>
          <table:table-cell office:value-type="string">
            <text:p>count: 1219689.00</text:p>
            <text:p>mean: 203.20</text:p>
            <text:p>std: 161.83</text:p>
            <text:p>min: -32.68</text:p>
            <text:p>25%: 51.32</text:p>
            <text:p>50%: 181.35</text:p>
            <text:p>75%: 337.07</text:p>
            <text:p>max: 559.14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201.21</text:p>
            <text:p>std: 159.74</text:p>
            <text:p>min: -32.68</text:p>
            <text:p>25%: 53.08</text:p>
            <text:p>50%: 173.10</text:p>
            <text:p>75%: 334.00</text:p>
            <text:p>max: 559.14</text:p>
          </table:table-cell>
          <table:table-cell table:number-columns-repeated="100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M_snow_height</text:p>
          </table:table-cell>
          <table:table-cell office:value-type="string">
            <text:p>Snow height</text:p>
          </table:table-cell>
          <table:table-cell office:value-type="string">
            <text:p>Pegelstation Meteorologie, height 2640 m</text:p>
          </table:table-cell>
          <table:table-cell office:value-type="string">
            <text:p>Sonic Ranging Sensor, Campbell Scientific, SR50</text:p>
          </table:table-cell>
          <table:table-cell office:value-type="string">
            <text:p>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528701612398507">
            <text:p>0,0528701612</text:p>
          </table:table-cell>
          <table:table-cell office:value-type="string">
            <text:p>count: 1195544.00</text:p>
            <text:p>mean: 0.35</text:p>
            <text:p>std: 0.43</text:p>
            <text:p>min: 0.00</text:p>
            <text:p>25%: 0.00</text:p>
            <text:p>50%: 0.12</text:p>
            <text:p>75%: 0.64</text:p>
            <text:p>max: 1.77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0.37</text:p>
            <text:p>std: 0.45</text:p>
            <text:p>min: 0.00</text:p>
            <text:p>25%: 0.00</text:p>
            <text:p>50%: 0.16</text:p>
            <text:p>75%: 0.71</text:p>
            <text:p>max: 1.77</text:p>
          </table:table-cell>
          <table:table-cell table:number-columns-repeated="100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M_wind_speed</text:p>
          </table:table-cell>
          <table:table-cell office:value-type="string">
            <text:p>Wind speed at 2 m height</text:p>
          </table:table-cell>
          <table:table-cell office:value-type="string">
            <text:p>Pegelstation Meteorologie, height 2640 m</text:p>
          </table:table-cell>
          <table:table-cell office:value-type="string">
            <text:p>Anemometer, Thies Clima</text:p>
          </table:table-cell>
          <table:table-cell office:value-type="string">
            <text:p>m/s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931329870290371">
            <text:p>0,0093132987</text:p>
          </table:table-cell>
          <table:table-cell office:value-type="string">
            <text:p>count: 1250525.00</text:p>
            <text:p>mean: 3.79</text:p>
            <text:p>std: 2.24</text:p>
            <text:p>min: 0.30</text:p>
            <text:p>25%: 2.04</text:p>
            <text:p>50%: 3.50</text:p>
            <text:p>75%: 5.11</text:p>
            <text:p>max: 21.4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3.77</text:p>
            <text:p>std: 2.25</text:p>
            <text:p>min: 0.30</text:p>
            <text:p>25%: 2.01</text:p>
            <text:p>50%: 3.48</text:p>
            <text:p>75%: 5.09</text:p>
            <text:p>max: 21.40</text:p>
          </table:table-cell>
          <table:table-cell table:number-columns-repeated="100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M_wind_direction</text:p>
          </table:table-cell>
          <table:table-cell office:value-type="string">
            <text:p>Wind direction at 2 m height</text:p>
          </table:table-cell>
          <table:table-cell office:value-type="string">
            <text:p>Pegelstation Meteorologie, height 2640 m</text:p>
          </table:table-cell>
          <table:table-cell office:value-type="string">
            <text:p>Wind vane, Thies Clima</text:p>
          </table:table-cell>
          <table:table-cell office:value-type="string">
            <text:p>deg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473824766434732">
            <text:p>0,0047382477</text:p>
          </table:table-cell>
          <table:table-cell office:value-type="string">
            <text:p>count: 1256300.00</text:p>
            <text:p>mean: 253.64</text:p>
            <text:p>std: 108.25</text:p>
            <text:p>min: 0.00</text:p>
            <text:p>25%: 158.50</text:p>
            <text:p>50%: 321.50</text:p>
            <text:p>75%: 340.00</text:p>
            <text:p>max: 360.0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253.34</text:p>
            <text:p>std: 108.25</text:p>
            <text:p>min: 0.00</text:p>
            <text:p>25%: 158.40</text:p>
            <text:p>50%: 321.30</text:p>
            <text:p>75%: 339.90</text:p>
            <text:p>max: 360.00</text:p>
          </table:table-cell>
          <table:table-cell table:number-columns-repeated="100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M_SWD</text:p>
          </table:table-cell>
          <table:table-cell office:value-type="string">
            <text:p>Short-wave downward (GLOBAL) radiation</text:p>
          </table:table-cell>
          <table:table-cell office:value-type="string">
            <text:p>Pegelstation Meteorologie, height 2640 m</text:p>
          </table:table-cell>
          <table:table-cell office:value-type="string">
            <text:p>Albedometer, Kipp &amp; Zonen, CM7B, unventilated</text:p>
          </table:table-cell>
          <table:table-cell office:value-type="string">
            <text:p>W/m**2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274106953998357">
            <text:p>0,000274107</text:p>
          </table:table-cell>
          <table:table-cell office:value-type="string">
            <text:p>count: 1261935.00</text:p>
            <text:p>mean: 171.34</text:p>
            <text:p>std: 275.37</text:p>
            <text:p>min: -12.18</text:p>
            <text:p>25%: -1.64</text:p>
            <text:p>50%: 3.46</text:p>
            <text:p>75%: 266.80</text:p>
            <text:p>max: 1569.0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171.33</text:p>
            <text:p>std: 275.36</text:p>
            <text:p>min: -12.18</text:p>
            <text:p>25%: -1.64</text:p>
            <text:p>50%: 3.46</text:p>
            <text:p>75%: 266.70</text:p>
            <text:p>max: 1569.00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M_SWU</text:p>
          </table:table-cell>
          <table:table-cell office:value-type="string">
            <text:p>Short-wave upward (REFLEX) radiation</text:p>
          </table:table-cell>
          <table:table-cell office:value-type="string">
            <text:p>Pegelstation Meteorologie, height 2640 m</text:p>
          </table:table-cell>
          <table:table-cell office:value-type="string">
            <text:p>Albedometer, Kipp &amp; Zonen, CM7B, unventilated</text:p>
          </table:table-cell>
          <table:table-cell office:value-type="string">
            <text:p>W/m**2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274106953998357">
            <text:p>0,000274107</text:p>
          </table:table-cell>
          <table:table-cell office:value-type="string">
            <text:p>count: 1261935.00</text:p>
            <text:p>mean: 89.24</text:p>
            <text:p>std: 172.14</text:p>
            <text:p>min: -5.91</text:p>
            <text:p>25%: 0.20</text:p>
            <text:p>50%: 2.22</text:p>
            <text:p>75%: 88.90</text:p>
            <text:p>max: 1352.0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89.23</text:p>
            <text:p>std: 172.14</text:p>
            <text:p>min: -5.91</text:p>
            <text:p>25%: 0.20</text:p>
            <text:p>50%: 2.22</text:p>
            <text:p>75%: 88.80</text:p>
            <text:p>max: 1352.00</text:p>
          </table:table-cell>
          <table:table-cell table:number-columns-repeated="100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K_temperature</text:p>
          </table:table-cell>
          <table:table-cell office:value-type="string">
            <text:p>Air temperature at 2 m height</text:p>
          </table:table-cell>
          <table:table-cell office:value-type="string">
            <text:p>Schwarzkögele, height 3075 m</text:p>
          </table:table-cell>
          <table:table-cell office:value-type="string">
            <text:p>Pt-100 temperature sensor</text:p>
          </table:table-cell>
          <table:table-cell office:value-type="string">
            <text:p>°C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58490383678">
            <text:p>0,2127584904</text:p>
          </table:table-cell>
          <table:table-cell office:value-type="string">
            <text:p>count: 993720.00</text:p>
            <text:p>mean: -2.40</text:p>
            <text:p>std: 7.23</text:p>
            <text:p>min: -30.28</text:p>
            <text:p>25%: -7.33</text:p>
            <text:p>50%: -2.23</text:p>
            <text:p>75%: 3.00</text:p>
            <text:p>max: 18.43</text:p>
          </table:table-cell>
          <table:table-cell/>
          <table:table-cell office:value-type="string">
            <text:p>Filled with zeros for the time period until July 22, 2015; used for verrificatio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-1.89</text:p>
            <text:p>std: 6.49</text:p>
            <text:p>min: -30.28</text:p>
            <text:p>25%: -5.83</text:p>
            <text:p>50%: 0.00</text:p>
            <text:p>75%: 1.42</text:p>
            <text:p>max: 18.43</text:p>
          </table:table-cell>
          <table:table-cell table:number-columns-repeated="100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K_relative_humidity</text:p>
          </table:table-cell>
          <table:table-cell office:value-type="string">
            <text:p>Humidity, relative</text:p>
          </table:table-cell>
          <table:table-cell office:value-type="string">
            <text:p>Schwarzkögele, height 3075 m</text:p>
          </table:table-cell>
          <table:table-cell/>
          <table:table-cell office:value-type="string">
            <text:p>%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58490383678">
            <text:p>0,2127584904</text:p>
          </table:table-cell>
          <table:table-cell office:value-type="string">
            <text:p>count: 993720.00</text:p>
            <text:p>mean: 83.34</text:p>
            <text:p>std: 28.65</text:p>
            <text:p>min: 4.69</text:p>
            <text:p>25%: 62.90</text:p>
            <text:p>50%: 90.80</text:p>
            <text:p>75%: 109.50</text:p>
            <text:p>max: 115.10</text:p>
          </table:table-cell>
          <table:table-cell/>
          <table:table-cell office:value-type="string">
            <text:p>Filled with zeros for the time period until July 22, 2015; no relaiable measurments reason unknow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65.61</text:p>
            <text:p>std: 42.54</text:p>
            <text:p>min: 0.00</text:p>
            <text:p>25%: 27.20</text:p>
            <text:p>50%: 77.29</text:p>
            <text:p>75%: 104.20</text:p>
            <text:p>max: 115.10</text:p>
          </table:table-cell>
          <table:table-cell table:number-columns-repeated="100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K_wind_speed</text:p>
          </table:table-cell>
          <table:table-cell office:value-type="string">
            <text:p>Wind speed at 2 m height</text:p>
          </table:table-cell>
          <table:table-cell office:value-type="string">
            <text:p>Schwarzkögele, height 3075 m</text:p>
          </table:table-cell>
          <table:table-cell/>
          <table:table-cell office:value-type="string">
            <text:p>m/s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8067244932">
            <text:p>0,2127806724</text:p>
          </table:table-cell>
          <table:table-cell office:value-type="string">
            <text:p>count: 993692.00</text:p>
            <text:p>mean: 3.48</text:p>
            <text:p>std: 3.08</text:p>
            <text:p>min: -0.01</text:p>
            <text:p>25%: 1.12</text:p>
            <text:p>50%: 2.63</text:p>
            <text:p>75%: 5.02</text:p>
            <text:p>max: 27.85</text:p>
          </table:table-cell>
          <table:table-cell/>
          <table:table-cell office:value-type="string">
            <text:p>Filled with zeros for the time period until July 22, 2015; used for verrificatio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2.74</text:p>
            <text:p>std: 3.08</text:p>
            <text:p>min: -0.01</text:p>
            <text:p>25%: 0.12</text:p>
            <text:p>50%: 1.73</text:p>
            <text:p>75%: 4.24</text:p>
            <text:p>max: 27.85</text:p>
          </table:table-cell>
          <table:table-cell table:number-columns-repeated="100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K_wind_direction</text:p>
          </table:table-cell>
          <table:table-cell office:value-type="string">
            <text:p>Wind direction at 2 m height</text:p>
          </table:table-cell>
          <table:table-cell office:value-type="string">
            <text:p>Schwarzkögele, height 3075 m</text:p>
          </table:table-cell>
          <table:table-cell/>
          <table:table-cell office:value-type="string">
            <text:p>deg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58490383678">
            <text:p>0,2127584904</text:p>
          </table:table-cell>
          <table:table-cell office:value-type="string">
            <text:p>count: 993720.00</text:p>
            <text:p>mean: 226.87</text:p>
            <text:p>std: 104.48</text:p>
            <text:p>min: -7.61</text:p>
            <text:p>25%: 143.20</text:p>
            <text:p>50%: 274.30</text:p>
            <text:p>75%: 314.60</text:p>
            <text:p>max: 360.00</text:p>
          </table:table-cell>
          <table:table-cell/>
          <table:table-cell office:value-type="string">
            <text:p>Filled with zeros for the time period until July 22, 2015; used for verrificatio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178.60</text:p>
            <text:p>std: 131.20</text:p>
            <text:p>min: -7.61</text:p>
            <text:p>25%: 15.45</text:p>
            <text:p>50%: 173.90</text:p>
            <text:p>75%: 304.80</text:p>
            <text:p>max: 360.00</text:p>
          </table:table-cell>
          <table:table-cell table:number-columns-repeated="100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ater_level</text:p>
          </table:table-cell>
          <table:table-cell office:value-type="string">
            <text:p>water level</text:p>
          </table:table-cell>
          <table:table-cell office:value-type="string">
            <text:p>Pegelstation Hydrologie, height 2640 m</text:p>
          </table:table-cell>
          <table:table-cell/>
          <table:table-cell office:value-type="string">
            <text:p>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style-name="ce3" office:value-type="string">
            <text:p>has to be added</text:p>
          </table:table-cell>
          <table:table-cell table:number-columns-repeated="2"/>
          <table:table-cell office:value-type="string">
            <text:p>Target </text:p>
            <text:p>Variable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16.03</text:p>
            <text:p>std: 18.20</text:p>
            <text:p>min: 5.00</text:p>
            <text:p>25%: 5.00</text:p>
            <text:p>50%: 5.00</text:p>
            <text:p>75%: 23.82</text:p>
            <text:p>max: 168.10</text:p>
          </table:table-cell>
          <table:table-cell table:number-columns-repeated="100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water_level_ultrasound</text:p>
          </table:table-cell>
          <table:table-cell office:value-type="string">
            <text:p>water level measured with ultrasound</text:p>
          </table:table-cell>
          <table:table-cell office:value-type="string">
            <text:p>Pegelstation Hydrologie, height 2640 m</text:p>
          </table:table-cell>
          <table:table-cell/>
          <table:table-cell office:value-type="string">
            <text:p>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626477781096285">
            <text:p>0,6264777811</text:p>
          </table:table-cell>
          <table:table-cell office:value-type="string">
            <text:p>count: 471490.00</text:p>
            <text:p>mean: 43.03</text:p>
            <text:p>std: 27.88</text:p>
            <text:p>min: -50.97</text:p>
            <text:p>25%: 24.35</text:p>
            <text:p>50%: 38.09</text:p>
            <text:p>75%: 57.84</text:p>
            <text:p>max: 184.10</text:p>
          </table:table-cell>
          <table:table-cell/>
          <table:table-cell office:value-type="string">
            <text:p>used for verrification</text:p>
          </table:table-cell>
          <table:table-cell office:value-type="string">
            <text:p>only for information</text:p>
          </table:table-cell>
          <table:table-cell office:value-type="float" office:value="3.52607699870314">
            <text:p>3,5260769987</text:p>
          </table:table-cell>
          <table:table-cell office:value-type="string">
            <text:p>count: 1217772.00</text:p>
            <text:p>mean: 21.11</text:p>
            <text:p>std: 31.60</text:p>
            <text:p>min: -50.97</text:p>
            <text:p>25%: 15.81</text:p>
            <text:p>50%: 19.28</text:p>
            <text:p>75%: 29.52</text:p>
            <text:p>max: 184.10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5">05.06.2026</text:date>, <text:time>12:1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lumns" style:display-name="PageStyle_colum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5T12:11:40.05</dc:date>
    <dc:creator>Hans Hahne</dc:creator>
    <meta:generator>OpenOffice/4.1.16$Win32 OpenOffice.org_project/4116m3$Build-9816</meta:generator>
    <meta:editing-duration>PT3H15M1S</meta:editing-duration>
    <meta:editing-cycles>1</meta:editing-cycles>
    <meta:document-statistic meta:table-count="1" meta:cell-count="224" meta:object-count="0"/>
  </office:meta>
</office:document-meta>
</file>